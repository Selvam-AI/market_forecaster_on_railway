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12A1EA1AF6A.png" manifest:media-type="image/png"/>
  <manifest:file-entry manifest:full-path="Pictures/10000001000004B3000002D0DF0BAAFC.png" manifest:media-type="image/png"/>
  <manifest:file-entry manifest:full-path="Pictures/100000010000036A000002AEA5802429.png" manifest:media-type="image/png"/>
  <manifest:file-entry manifest:full-path="Pictures/100000010000050B000002C52640F21F.png" manifest:media-type="image/png"/>
  <manifest:file-entry manifest:full-path="Pictures/10000001000006D3000003EDD18B9CC9.png" manifest:media-type="image/png"/>
  <manifest:file-entry manifest:full-path="Pictures/10000001000004C20000039DA094B59A.png" manifest:media-type="image/png"/>
  <manifest:file-entry manifest:full-path="Pictures/10000001000003830000035B2E5A0A59.png" manifest:media-type="image/png"/>
  <manifest:file-entry manifest:full-path="Pictures/1000000100000364000001483C0437D7.png" manifest:media-type="image/png"/>
  <manifest:file-entry manifest:full-path="Pictures/10000001000004C80000017FC0BE6859.png" manifest:media-type="image/png"/>
  <manifest:file-entry manifest:full-path="Pictures/10000001000006E600000336978A494C.png" manifest:media-type="image/png"/>
  <manifest:file-entry manifest:full-path="Pictures/100000010000050800000404E2248E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34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top="0.203cm" fo:margin-bottom="0.356cm" fo:text-align="start"/>
    </style:style>
    <style:style style:name="P7" style:family="paragraph">
      <style:paragraph-properties fo:margin-top="0.42cm" fo:margin-bottom="0.35cm"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732cm" svg:height="15.749cm" svg:x="8.208cm" svg:y="0cm">
          <draw:image xlink:href="Pictures/100000010000050800000404E2248E54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8.89cm" svg:x="1.27cm" svg:y="1.905cm">
          <draw:text-box>
            <text:p text:style-name="P2"><text:span text:style-name="T1">Start </text:span><text:span text:style-name="T2">Backend server </text:span><text:span text:style-name="T1">from the project folder::</text:span></text:p>
            <text:p text:style-name="P2"><text:span text:style-name="T1">$ cd "project 1"</text:span></text:p>
            <text:p text:style-name="P2"><text:span text:style-name="T1">$ scripts/run_dashboard.sh</text:span></text:p>
            <text:p text:style-name="P2"><text:span text:style-name="T3"><text:tab/>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8.76cm" svg:x="-0.059cm" svg:y="5.21cm">
          <draw:image xlink:href="Pictures/10000001000004C80000017FC0BE6859.png" xlink:type="simple" xlink:show="embed" xlink:actuate="onLoad" draw:mime-type="image/png">
            <text:p/>
          </draw:image>
        </draw:frame>
        <draw:frame draw:style-name="gr4" draw:text-style-name="P5" draw:layer="layout" svg:width="8.255cm" svg:height="3.81cm" svg:x="1.27cm" svg:y="0.635cm">
          <draw:text-box>
            <text:p text:style-name="P2"><text:span text:style-name="T1">Backend server has started.</text:span><text:span text:style-name="T1"><text:line-break/></text:span><text:span text:style-name="T1"/></text:p>
            <text:p text:style-name="P2"><text:span text:style-name="T1">Open the dashboard in browser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0.737cm" svg:height="15.749cm" svg:x="6.985cm" svg:y="0.019cm">
          <draw:image xlink:href="Pictures/10000001000004C20000039DA094B59A.png" xlink:type="simple" xlink:show="embed" xlink:actuate="onLoad" draw:mime-type="image/png">
            <text:p/>
          </draw:image>
        </draw:frame>
        <draw:frame draw:style-name="gr5" draw:text-style-name="P5" draw:layer="layout" svg:width="5.715cm" svg:height="7.62cm" svg:x="0.635cm" svg:y="1.27cm">
          <draw:text-box>
            <text:p><text:span text:style-name="T1">1. command line – shows connection open with browser and backend server.</text:span></text:p>
            <text:p><text:span text:style-name="T1"/></text:p>
            <text:p><text:span text:style-name="T1">2. In browser Dashboard is shown to use Openai. More on this further dow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377cm" svg:height="15.749cm" svg:x="0.358cm" svg:y="0.019cm">
          <draw:image xlink:href="Pictures/10000001000006D3000003EDD18B9C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3.032cm" svg:x="0.047cm" svg:y="1.378cm">
          <draw:image xlink:href="Pictures/10000001000006E600000336978A49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2.965cm" svg:height="8.677cm" svg:x="1.905cm" svg:y="6.35cm">
          <draw:image xlink:href="Pictures/1000000100000364000001483C0437D7.png" xlink:type="simple" xlink:show="embed" xlink:actuate="onLoad" draw:mime-type="image/png">
            <text:p/>
          </draw:image>
        </draw:frame>
        <draw:frame draw:style-name="gr6" draw:text-style-name="P3" draw:layer="layout" svg:width="19.05cm" svg:height="6.594cm" svg:x="3.175cm" svg:y="0.007cm">
          <draw:text-box>
            <text:p text:style-name="P2"><text:span text:style-name="T1">Th</text:span><text:span text:style-name="T4">e Scraper Agent collects the relevant news below based on criteria -</text:span></text:p>
            <text:p text:style-name="P6"><text:span text:style-name="T4">- Middle East geopolitical events</text:span></text:p>
            <text:p text:style-name="P6"><text:span text:style-name="T4">- Oil supply or oil price risk</text:span></text:p>
            <text:p text:style-name="P6"><text:span text:style-name="T4">- Shipping disruption</text:span></text:p>
            <text:p text:style-name="P6"><text:span text:style-name="T4">- Aviation disruption</text:span></text:p>
            <text:p text:style-name="P6"><text:span text:style-name="T4">- Regional instability or conflict</text:span></text:p>
            <text:p text:style-name="P6"><text:span text:style-name="T4">- News that may affect sectors like Offshore &amp; Marine or Airlines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6.482cm" svg:height="15.749cm" svg:x="11.27cm" svg:y="-0.024cm">
          <draw:image xlink:href="Pictures/10000001000003830000035B2E5A0A59.png" xlink:type="simple" xlink:show="embed" xlink:actuate="onLoad" draw:mime-type="image/png">
            <text:p/>
          </draw:image>
        </draw:frame>
        <draw:frame draw:style-name="gr5" draw:text-style-name="P3" draw:layer="layout" svg:width="8.255cm" svg:height="7.62cm" svg:x="1.27cm" svg:y="1.27cm">
          <draw:text-box>
            <text:p>An article from the link.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15.376cm" svg:x="0.047cm" svg:y="0.206cm">
          <draw:image xlink:href="Pictures/100000010000050B000002C52640F2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0.066cm" svg:height="15.749cm" svg:x="7.874cm" svg:y="0.126cm">
          <draw:image xlink:href="Pictures/100000010000036A000002AEA5802429.png" xlink:type="simple" xlink:show="embed" xlink:actuate="onLoad" draw:mime-type="image/png">
            <text:p/>
          </draw:image>
        </draw:frame>
        <draw:frame draw:style-name="gr2" draw:text-style-name="P3" draw:layer="layout" svg:width="5.715cm" svg:height="8.89cm" svg:x="1.27cm" svg:y="0.635cm">
          <draw:text-box>
            <text:p>How you may switch from OpenAI to Rule based analysis.</text:p>
            <text:p/>
            <text:p>Uncomment the constant in the .env file.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6.314cm" svg:height="15.749cm" svg:x="0.89cm" svg:y="0.019cm">
          <draw:image xlink:href="Pictures/10000001000004B3000002D0DF0BA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2.753cm" svg:height="7.884cm" svg:x="2.67cm" svg:y="3.952cm">
          <draw:image xlink:href="Pictures/100000010000035C0000012A1EA1AF6A.png" xlink:type="simple" xlink:show="embed" xlink:actuate="onLoad" draw:mime-type="image/png">
            <text:p/>
          </draw:image>
        </draw:frame>
        <draw:frame draw:style-name="gr7" draw:text-style-name="P3" draw:layer="layout" svg:width="16.51cm" svg:height="1.905cm" svg:x="3.175cm" svg:y="1.27cm">
          <draw:text-box>
            <text:p>To stop the backend server. </text:p>
            <text:p>Press ctrl + c in command line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6-17T17:48:30.198474990</meta:creation-date>
    <dc:date>2026-06-18T11:51:51.811765783</dc:date>
    <meta:editing-duration>PT6M28S</meta:editing-duration>
    <meta:editing-cycles>2</meta:editing-cycles>
    <meta:generator>LibreOffice/24.2.7.2$Linux_X86_64 LibreOffice_project/420$Build-2</meta:generator>
    <meta:document-statistic meta:object-count="61"/>
  </office:meta>
</office:document-meta>
</file>